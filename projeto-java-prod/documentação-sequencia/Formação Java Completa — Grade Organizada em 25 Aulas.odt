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background-color="#000000"/>
    </style:style>
    <style:style style:name="P2" style:family="paragraph" style:parent-style-name="Text_20_body">
      <style:text-properties style:font-name="Arial1"/>
    </style:style>
    <style:style style:name="P3" style:family="paragraph" style:parent-style-name="Heading_20_2">
      <style:text-properties style:font-name="Arial1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Arial1"/>
    </style:style>
    <style:style style:name="P5" style:family="paragraph" style:parent-style-name="Text_20_body" style:list-style-name="L1">
      <style:text-properties style:font-name="Arial1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Arial1"/>
    </style:style>
    <style:style style:name="P7" style:family="paragraph" style:parent-style-name="Text_20_body" style:list-style-name="L2">
      <style:text-properties style:font-name="Arial1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Arial1"/>
    </style:style>
    <style:style style:name="P9" style:family="paragraph" style:parent-style-name="Text_20_body" style:list-style-name="L3">
      <style:text-properties style:font-name="Arial1"/>
    </style:style>
    <style:style style:name="P10" style:family="paragraph" style:parent-style-name="Heading_20_2">
      <style:paragraph-properties fo:margin-top="0cm" fo:margin-bottom="0.247cm" style:contextual-spacing="false" fo:line-height="115%"/>
      <style:text-properties style:font-name="Arial1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Arial1"/>
    </style:style>
    <style:style style:name="P12" style:family="paragraph" style:parent-style-name="Text_20_body" style:list-style-name="L4">
      <style:text-properties style:font-name="Arial1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style:font-name="Arial1"/>
    </style:style>
    <style:style style:name="P14" style:family="paragraph" style:parent-style-name="Heading_20_1">
      <style:paragraph-properties fo:margin-top="0cm" fo:margin-bottom="0.247cm" style:contextual-spacing="false" fo:line-height="115%"/>
      <style:text-properties style:font-name="Arial1"/>
    </style:style>
    <style:style style:name="P15" style:family="paragraph" style:parent-style-name="Heading_20_2">
      <style:paragraph-properties fo:margin-top="0cm" fo:margin-bottom="0.247cm" style:contextual-spacing="false" fo:line-height="115%"/>
      <style:text-properties style:text-line-through-style="solid" style:text-line-through-type="single" style:font-name="Arial1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17" style:family="paragraph" style:parent-style-name="Horizontal_20_Line">
      <style:paragraph-properties fo:margin-top="0cm" fo:margin-bottom="0.247cm" style:contextual-spacing="false" fo:line-height="115%"/>
      <style:text-properties style:text-line-through-style="solid" style:text-line-through-type="single" style:font-name="Arial1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19" style:family="paragraph" style:parent-style-name="Text_20_body" style:list-style-name="L6">
      <style:text-properties style:text-line-through-style="solid" style:text-line-through-type="single" style:font-name="Arial1"/>
    </style:style>
    <style:style style:name="P20" style:family="paragraph" style:parent-style-name="Heading_20_2">
      <style:paragraph-properties fo:margin-top="0cm" fo:margin-bottom="0.247cm" style:contextual-spacing="false" fo:line-height="115%"/>
      <style:text-properties style:text-line-through-style="solid" style:text-line-through-type="single" style:font-name="Arial1" officeooo:rsid="002bf385" officeooo:paragraph-rsid="002bf385"/>
    </style:style>
    <style:style style:name="P21" style:family="paragraph" style:parent-style-name="Text_20_body" style:list-style-name="L7">
      <style:paragraph-properties fo:margin-top="0cm" fo:margin-bottom="0cm" style:contextual-spacing="false" fo:line-height="115%"/>
      <style:text-properties style:text-line-through-style="solid" style:text-line-through-type="single" style:font-name="Arial1" officeooo:rsid="002bf385" officeooo:paragraph-rsid="002bf385"/>
    </style:style>
    <style:style style:name="P22" style:family="paragraph" style:parent-style-name="Text_20_body" style:list-style-name="L7">
      <style:paragraph-properties fo:margin-top="0cm" fo:margin-bottom="0cm" style:contextual-spacing="false" fo:line-height="115%"/>
      <style:text-properties style:text-line-through-style="solid" style:text-line-through-type="single" style:font-name="Arial1" officeooo:rsid="002bf385" officeooo:paragraph-rsid="0036b4f9"/>
    </style:style>
    <style:style style:name="P23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  <style:text-properties style:text-line-through-style="solid" style:text-line-through-type="single" style:font-name="Arial1" officeooo:rsid="002bf385" officeooo:paragraph-rsid="002bf385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25" style:family="paragraph" style:parent-style-name="Text_20_body" style:list-style-name="L8">
      <style:text-properties style:text-line-through-style="solid" style:text-line-through-type="single" style:font-name="Arial1"/>
    </style:style>
    <style:style style:name="P26" style:family="paragraph" style:parent-style-name="Heading_20_1">
      <style:paragraph-properties fo:margin-top="0cm" fo:margin-bottom="0.247cm" style:contextual-spacing="false" fo:line-height="115%"/>
      <style:text-properties style:text-line-through-style="solid" style:text-line-through-type="single" style:font-name="Arial1"/>
    </style:style>
    <style:style style:name="P27" style:family="paragraph" style:parent-style-name="Text_20_body" style:list-style-name="L9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28" style:family="paragraph" style:parent-style-name="Text_20_body" style:list-style-name="L9">
      <style:text-properties style:text-line-through-style="solid" style:text-line-through-type="single" style:font-name="Arial1"/>
    </style:style>
    <style:style style:name="P29" style:family="paragraph" style:parent-style-name="Text_20_body" style:list-style-name="L10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30" style:family="paragraph" style:parent-style-name="Text_20_body" style:list-style-name="L10">
      <style:text-properties style:text-line-through-style="solid" style:text-line-through-type="single" style:font-name="Arial1"/>
    </style:style>
    <style:style style:name="P31" style:family="paragraph" style:parent-style-name="Text_20_body" style:list-style-name="L11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32" style:family="paragraph" style:parent-style-name="Text_20_body" style:list-style-name="L11">
      <style:text-properties style:text-line-through-style="solid" style:text-line-through-type="single" style:font-name="Arial1"/>
    </style:style>
    <style:style style:name="P33" style:family="paragraph" style:parent-style-name="Text_20_body" style:list-style-name="L12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34" style:family="paragraph" style:parent-style-name="Text_20_body" style:list-style-name="L12">
      <style:text-properties style:text-line-through-style="solid" style:text-line-through-type="single" style:font-name="Arial1"/>
    </style:style>
    <style:style style:name="P35" style:family="paragraph" style:parent-style-name="Text_20_body" style:list-style-name="L13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36" style:family="paragraph" style:parent-style-name="Text_20_body" style:list-style-name="L13">
      <style:text-properties style:text-line-through-style="solid" style:text-line-through-type="single" style:font-name="Arial1"/>
    </style:style>
    <style:style style:name="P37" style:family="paragraph" style:parent-style-name="Text_20_body" style:list-style-name="L14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38" style:family="paragraph" style:parent-style-name="Text_20_body" style:list-style-name="L14">
      <style:text-properties style:text-line-through-style="solid" style:text-line-through-type="single" style:font-name="Arial1"/>
    </style:style>
    <style:style style:name="P39" style:family="paragraph" style:parent-style-name="Text_20_body" style:list-style-name="L15">
      <style:paragraph-properties fo:margin-top="0cm" fo:margin-bottom="0cm" style:contextual-spacing="false"/>
      <style:text-properties style:text-line-through-style="solid" style:text-line-through-type="single" style:font-name="Arial1"/>
    </style:style>
    <style:style style:name="P40" style:family="paragraph" style:parent-style-name="Text_20_body" style:list-style-name="L15">
      <style:text-properties style:text-line-through-style="solid" style:text-line-through-type="single" style:font-name="Arial1"/>
    </style:style>
    <style:style style:name="P41" style:family="paragraph" style:parent-style-name="Text_20_body" style:list-style-name="L16">
      <style:paragraph-properties fo:margin-top="0cm" fo:margin-bottom="0cm" style:contextual-spacing="false"/>
      <style:text-properties style:font-name="Arial1"/>
    </style:style>
    <style:style style:name="P42" style:family="paragraph" style:parent-style-name="Text_20_body" style:list-style-name="L16">
      <style:text-properties style:font-name="Arial1"/>
    </style:style>
    <style:style style:name="P43" style:family="paragraph" style:parent-style-name="Text_20_body" style:list-style-name="L17">
      <style:paragraph-properties fo:margin-top="0cm" fo:margin-bottom="0cm" style:contextual-spacing="false"/>
      <style:text-properties style:font-name="Arial1"/>
    </style:style>
    <style:style style:name="P44" style:family="paragraph" style:parent-style-name="Text_20_body" style:list-style-name="L17">
      <style:text-properties style:font-name="Arial1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style:font-name="Arial1"/>
    </style:style>
    <style:style style:name="P46" style:family="paragraph" style:parent-style-name="Text_20_body" style:list-style-name="L18">
      <style:text-properties style:font-name="Arial1"/>
    </style:style>
    <style:style style:name="P47" style:family="paragraph" style:parent-style-name="Text_20_body" style:list-style-name="L19">
      <style:paragraph-properties fo:margin-top="0cm" fo:margin-bottom="0cm" style:contextual-spacing="false"/>
      <style:text-properties style:font-name="Arial1"/>
    </style:style>
    <style:style style:name="P48" style:family="paragraph" style:parent-style-name="Text_20_body" style:list-style-name="L19">
      <style:text-properties style:font-name="Arial1"/>
    </style:style>
    <style:style style:name="P49" style:family="paragraph" style:parent-style-name="Text_20_body" style:list-style-name="L20">
      <style:paragraph-properties fo:margin-top="0cm" fo:margin-bottom="0cm" style:contextual-spacing="false"/>
      <style:text-properties style:font-name="Arial1"/>
    </style:style>
    <style:style style:name="P50" style:family="paragraph" style:parent-style-name="Text_20_body" style:list-style-name="L20">
      <style:text-properties style:font-name="Arial1"/>
    </style:style>
    <style:style style:name="P51" style:family="paragraph" style:parent-style-name="Text_20_body" style:list-style-name="L21">
      <style:paragraph-properties fo:margin-top="0cm" fo:margin-bottom="0cm" style:contextual-spacing="false"/>
      <style:text-properties style:font-name="Arial1"/>
    </style:style>
    <style:style style:name="P52" style:family="paragraph" style:parent-style-name="Text_20_body" style:list-style-name="L21">
      <style:text-properties style:font-name="Arial1"/>
    </style:style>
    <style:style style:name="P53" style:family="paragraph" style:parent-style-name="Text_20_body" style:list-style-name="L22">
      <style:paragraph-properties fo:margin-top="0cm" fo:margin-bottom="0cm" style:contextual-spacing="false"/>
      <style:text-properties style:font-name="Arial1"/>
    </style:style>
    <style:style style:name="P54" style:family="paragraph" style:parent-style-name="Text_20_body" style:list-style-name="L22">
      <style:text-properties style:font-name="Arial1"/>
    </style:style>
    <style:style style:name="P55" style:family="paragraph" style:parent-style-name="Text_20_body" style:list-style-name="L23">
      <style:paragraph-properties fo:margin-top="0cm" fo:margin-bottom="0cm" style:contextual-spacing="false"/>
      <style:text-properties style:font-name="Arial1"/>
    </style:style>
    <style:style style:name="P56" style:family="paragraph" style:parent-style-name="Text_20_body" style:list-style-name="L23">
      <style:text-properties style:font-name="Arial1"/>
    </style:style>
    <style:style style:name="P57" style:family="paragraph" style:parent-style-name="Text_20_body" style:list-style-name="L24">
      <style:paragraph-properties fo:margin-top="0cm" fo:margin-bottom="0cm" style:contextual-spacing="false"/>
      <style:text-properties style:font-name="Arial1"/>
    </style:style>
    <style:style style:name="P58" style:family="paragraph" style:parent-style-name="Text_20_body" style:list-style-name="L24">
      <style:text-properties style:font-name="Arial1"/>
    </style:style>
    <style:style style:name="P59" style:family="paragraph" style:parent-style-name="Text_20_body" style:list-style-name="L25">
      <style:paragraph-properties fo:margin-top="0cm" fo:margin-bottom="0cm" style:contextual-spacing="false"/>
      <style:text-properties style:font-name="Arial1"/>
    </style:style>
    <style:style style:name="P60" style:family="paragraph" style:parent-style-name="Text_20_body" style:list-style-name="L25">
      <style:text-properties style:font-name="Arial1"/>
    </style:style>
    <style:style style:name="P61" style:family="paragraph" style:parent-style-name="Text_20_body" style:list-style-name="L26">
      <style:paragraph-properties fo:margin-top="0cm" fo:margin-bottom="0cm" style:contextual-spacing="false"/>
      <style:text-properties style:font-name="Arial1"/>
    </style:style>
    <style:style style:name="P62" style:family="paragraph" style:parent-style-name="Text_20_body" style:list-style-name="L26">
      <style:text-properties style:font-name="Arial1"/>
    </style:style>
    <style:style style:name="P63" style:family="paragraph" style:parent-style-name="Text_20_body" style:list-style-name="L27">
      <style:paragraph-properties fo:margin-top="0cm" fo:margin-bottom="0cm" style:contextual-spacing="false"/>
      <style:text-properties style:font-name="Arial1"/>
    </style:style>
    <style:style style:name="P64" style:family="paragraph" style:parent-style-name="Text_20_body" style:list-style-name="L27">
      <style:text-properties style:font-name="Arial1"/>
    </style:style>
    <style:style style:name="P65" style:family="paragraph" style:parent-style-name="Text_20_body" style:list-style-name="L28">
      <style:paragraph-properties fo:margin-top="0cm" fo:margin-bottom="0cm" style:contextual-spacing="false"/>
      <style:text-properties style:font-name="Arial1"/>
    </style:style>
    <style:style style:name="P66" style:family="paragraph" style:parent-style-name="Text_20_body" style:list-style-name="L28">
      <style:text-properties style:font-name="Arial1"/>
    </style:style>
    <style:style style:name="P67" style:family="paragraph" style:parent-style-name="Text_20_body" style:list-style-name="L29">
      <style:paragraph-properties fo:margin-top="0cm" fo:margin-bottom="0cm" style:contextual-spacing="false"/>
      <style:text-properties style:font-name="Arial1"/>
    </style:style>
    <style:style style:name="P68" style:family="paragraph" style:parent-style-name="Text_20_body" style:list-style-name="L29">
      <style:text-properties style:font-name="Arial1"/>
    </style:style>
    <style:style style:name="P69" style:family="paragraph" style:parent-style-name="Text_20_body" style:list-style-name="L30">
      <style:paragraph-properties fo:margin-top="0cm" fo:margin-bottom="0cm" style:contextual-spacing="false"/>
      <style:text-properties style:font-name="Arial1"/>
    </style:style>
    <style:style style:name="P70" style:family="paragraph" style:parent-style-name="Text_20_body" style:list-style-name="L30">
      <style:text-properties style:font-name="Arial1"/>
    </style:style>
    <style:style style:name="P71" style:family="paragraph" style:parent-style-name="Text_20_body" style:list-style-name="L31">
      <style:paragraph-properties fo:margin-top="0cm" fo:margin-bottom="0cm" style:contextual-spacing="false"/>
      <style:text-properties style:font-name="Arial1"/>
    </style:style>
    <style:style style:name="P72" style:family="paragraph" style:parent-style-name="Text_20_body" style:list-style-name="L31">
      <style:text-properties style:font-name="Arial1"/>
    </style:style>
    <style:style style:name="P73" style:family="paragraph" style:parent-style-name="Text_20_body" style:list-style-name="L32">
      <style:paragraph-properties fo:margin-top="0cm" fo:margin-bottom="0cm" style:contextual-spacing="false"/>
      <style:text-properties style:font-name="Arial1"/>
    </style:style>
    <style:style style:name="P74" style:family="paragraph" style:parent-style-name="Text_20_body" style:list-style-name="L32">
      <style:text-properties style:font-name="Arial1"/>
    </style:style>
    <style:style style:name="P75" style:family="paragraph" style:parent-style-name="Text_20_body" style:list-style-name="L33">
      <style:paragraph-properties fo:margin-top="0cm" fo:margin-bottom="0cm" style:contextual-spacing="false"/>
      <style:text-properties style:font-name="Arial1"/>
    </style:style>
    <style:style style:name="P76" style:family="paragraph" style:parent-style-name="Text_20_body" style:list-style-name="L33">
      <style:text-properties style:font-name="Arial1"/>
    </style:style>
    <style:style style:name="P77" style:family="paragraph" style:parent-style-name="Text_20_body" style:list-style-name="L34">
      <style:paragraph-properties fo:margin-top="0cm" fo:margin-bottom="0cm" style:contextual-spacing="false"/>
      <style:text-properties style:font-name="Arial1"/>
    </style:style>
    <style:style style:name="P78" style:family="paragraph" style:parent-style-name="Text_20_body" style:list-style-name="L34">
      <style:text-properties style:font-name="Arial1"/>
    </style:style>
    <style:style style:name="P79" style:family="paragraph" style:parent-style-name="Text_20_body" style:list-style-name="L35">
      <style:paragraph-properties fo:margin-top="0cm" fo:margin-bottom="0cm" style:contextual-spacing="false"/>
      <style:text-properties style:font-name="Arial1"/>
    </style:style>
    <style:style style:name="P80" style:family="paragraph" style:parent-style-name="Text_20_body" style:list-style-name="L35">
      <style:text-properties style:font-name="Arial1"/>
    </style:style>
    <style:style style:name="P81" style:family="paragraph" style:parent-style-name="Text_20_body" style:list-style-name="L36">
      <style:paragraph-properties fo:margin-top="0cm" fo:margin-bottom="0cm" style:contextual-spacing="false"/>
      <style:text-properties style:font-name="Arial1"/>
    </style:style>
    <style:style style:name="P82" style:family="paragraph" style:parent-style-name="Text_20_body" style:list-style-name="L36">
      <style:text-properties style:font-name="Arial1"/>
    </style:style>
    <style:style style:name="P83" style:family="paragraph" style:parent-style-name="Text_20_body" style:list-style-name="L37">
      <style:paragraph-properties fo:margin-top="0cm" fo:margin-bottom="0cm" style:contextual-spacing="false"/>
      <style:text-properties style:font-name="Arial1"/>
    </style:style>
    <style:style style:name="P84" style:family="paragraph" style:parent-style-name="Text_20_body" style:list-style-name="L37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rmação Java Completa — Grade Organizada em 25 Aulas</text:h>
      <text:p text:style-name="P2"/>
      <text:h text:style-name="P3" text:outline-level="2">Estrutura Atualizada da Formação</text:h>
      <text:p text:style-name="P2">Cada encontro possui aproximadamente 2 horas de duração.</text:p>
      <text:p text:style-name="P2">A formação foi reorganizada para:</text:p>
      <text:list text:style-name="L1">
        <text:list-item>
          <text:p text:style-name="P4">Reduzir quantidade de encontros</text:p>
        </text:list-item>
        <text:list-item>
          <text:p text:style-name="P4">Aumentar produtividade por aula</text:p>
        </text:list-item>
        <text:list-item>
          <text:p text:style-name="P4">Melhorar fluidez do aprendizado</text:p>
        </text:list-item>
        <text:list-item>
          <text:p text:style-name="P4">Diminuir fragmentação excessiva</text:p>
        </text:list-item>
        <text:list-item>
          <text:p text:style-name="P4">Tornar a experiência mais dinâmica</text:p>
        </text:list-item>
        <text:list-item>
          <text:p text:style-name="P5">Permitir mais prática dentro da própria aula</text:p>
        </text:list-item>
      </text:list>
      <text:p text:style-name="P2">A nova estrutura foi pensada com foco em:</text:p>
      <text:list text:style-name="L2">
        <text:list-item>
          <text:p text:style-name="P6">Mercado Java atual</text:p>
        </text:list-item>
        <text:list-item>
          <text:p text:style-name="P6">Formação acelerada</text:p>
        </text:list-item>
        <text:list-item>
          <text:p text:style-name="P6">Maior retenção do aluno</text:p>
        </text:list-item>
        <text:list-item>
          <text:p text:style-name="P6">Didática moderna</text:p>
        </text:list-item>
        <text:list-item>
          <text:p text:style-name="P6">Melhor distribuição de conteúdo em aulas de 2 horas</text:p>
        </text:list-item>
        <text:list-item>
          <text:p text:style-name="P6">Mais prática por encontro</text:p>
        </text:list-item>
        <text:list-item>
          <text:p text:style-name="P7">Evolução progressiva sem sobrecarga</text:p>
        </text:list-item>
      </text:list>
      <text:p text:style-name="P2">A formação foi reorganizada para 29 encontros, permitindo:</text:p>
      <text:list text:style-name="L3">
        <text:list-item>
          <text:p text:style-name="P8">Melhor equilíbrio entre teoria e prática</text:p>
        </text:list-item>
        <text:list-item>
          <text:p text:style-name="P8">Menor sobrecarga cognitiva</text:p>
        </text:list-item>
        <text:list-item>
          <text:p text:style-name="P8">Mais exercícios em sala</text:p>
        </text:list-item>
        <text:list-item>
          <text:p text:style-name="P8">Maior profundidade nos assuntos modernos</text:p>
        </text:list-item>
        <text:list-item>
          <text:p text:style-name="P8">Melhor retenção do aluno</text:p>
        </text:list-item>
        <text:list-item>
          <text:p text:style-name="P8">Maior sensação de evolução durante a formação</text:p>
        </text:list-item>
        <text:list-item>
          <text:p text:style-name="P9">Evolução progressiva sem sobrecarga</text:p>
        </text:list-item>
      </text:list>
      <text:h text:style-name="P10" text:outline-level="2">Objetivo da Formação</text:h>
      <text:p text:style-name="P2">Formar programadores Java preparados para:</text:p>
      <text:list text:style-name="L4">
        <text:list-item>
          <text:p text:style-name="P11">Mercado de trabalho atual</text:p>
        </text:list-item>
        <text:list-item>
          <text:p text:style-name="P11">Java moderno (Java 21/25)</text:p>
        </text:list-item>
        <text:list-item>
          <text:p text:style-name="P11">Desenvolvimento backend profissional</text:p>
        </text:list-item>
        <text:list-item>
          <text:p text:style-name="P11">APIs REST</text:p>
        </text:list-item>
        <text:list-item>
          <text:p text:style-name="P11">Spring Boot</text:p>
        </text:list-item>
        <text:list-item>
          <text:p text:style-name="P11">Boas práticas</text:p>
        </text:list-item>
        <text:list-item>
          <text:p text:style-name="P11">Arquitetura profissional</text:p>
        </text:list-item>
        <text:list-item>
          <text:p text:style-name="P12">Desenvolvimento real</text:p>
        </text:list-item>
      </text:list>
      <text:p text:style-name="P2">A formação foi organizada em ordem pedagógica correta para iniciantes absolutos evoluírem até o nível profissional.</text:p>
      <text:p text:style-name="P13"><text:soft-page-break/></text:p>
      <text:h text:style-name="P14" text:outline-level="1">FASE 1 — INTRODUÇÃO À PROGRAMAÇÃO E AMBIENTE</text:h>
      <text:h text:style-name="P15" text:outline-level="2">Encontro 1 — Introdução ao Java e Mercado Profissional</text:h>
      <text:list text:style-name="L5">
        <text:list-item>
          <text:p text:style-name="P16">O que é programação</text:p>
        </text:list-item>
        <text:list-item>
          <text:p text:style-name="P16">O que é algoritmo</text:p>
        </text:list-item>
        <text:list-item>
          <text:p text:style-name="P16">O que é lógica</text:p>
        </text:list-item>
        <text:list-item>
          <text:p text:style-name="P16">O que é Java</text:p>
        </text:list-item>
        <text:list-item>
          <text:p text:style-name="P16">Onde Java é utilizado</text:p>
        </text:list-item>
        <text:list-item>
          <text:p text:style-name="P16">Mercado Java atual</text:p>
        </text:list-item>
        <text:list-item>
          <text:p text:style-name="P16">Diferença entre linguagem e framework</text:p>
        </text:list-item>
        <text:list-item>
          <text:p text:style-name="P16">Roadmap da formação</text:p>
        </text:list-item>
      </text:list>
      <text:p text:style-name="P17"/>
      <text:h text:style-name="P15" text:outline-level="2">Encontro 2 — Instalação e Ambiente Profissional</text:h>
      <text:list text:style-name="L6">
        <text:list-item>
          <text:p text:style-name="P18">Instalação do JDK 21/25</text:p>
        </text:list-item>
        <text:list-item>
          <text:p text:style-name="P18">JVM</text:p>
        </text:list-item>
        <text:list-item>
          <text:p text:style-name="P18">JDK</text:p>
        </text:list-item>
        <text:list-item>
          <text:p text:style-name="P18">JRE</text:p>
        </text:list-item>
        <text:list-item>
          <text:p text:style-name="P18">JAVA_HOME</text:p>
        </text:list-item>
        <text:list-item>
          <text:p text:style-name="P18">PATH</text:p>
        </text:list-item>
        <text:list-item>
          <text:p text:style-name="P18">Estrutura inicial de projeto</text:p>
        </text:list-item>
        <text:list-item>
          <text:p text:style-name="P18">Execução via IDE</text:p>
        </text:list-item>
        <text:list-item>
          <text:p text:style-name="P18">Execução via terminal</text:p>
          <text:p text:style-name="P19"/>
        </text:list-item>
      </text:list>
      <text:p text:style-name="P17"/>
      <text:h text:style-name="P20" text:outline-level="2">Conhecendo o Eclipse IDE</text:h>
      <text:list text:style-name="L7">
        <text:list-item>
          <text:p text:style-name="P21">Conhecendo o Eclipse IDE</text:p>
        </text:list-item>
        <text:list-item>
          <text:p text:style-name="P21">O que são as perpectivas</text:p>
        </text:list-item>
        <text:list-item>
          <text:p text:style-name="P21">Customizando um perpectiva <text:s text:c="2"/></text:p>
        </text:list-item>
        <text:list-item>
          <text:p text:style-name="P21">Exibindo abas e recursos</text:p>
        </text:list-item>
        <text:list-item>
          <text:p text:style-name="P21">Organizando abas dinamicamente</text:p>
        </text:list-item>
        <text:list-item>
          <text:p text:style-name="P22">Dupla visualização da IDE</text:p>
        </text:list-item>
        <text:list-item>
          <text:p text:style-name="P21">Primeiro projeto Java e Maven</text:p>
        </text:list-item>
        <text:list-item>
          <text:p text:style-name="P21">Configurando o Java no pom.xml</text:p>
        </text:list-item>
        <text:list-item>
          <text:p text:style-name="P21">Auto complete Maven</text:p>
        </text:list-item>
        <text:list-item>
          <text:p text:style-name="P21">Estrutura de pastas do projeto</text:p>
        </text:list-item>
      </text:list>
      <text:p text:style-name="P23"/>
      <text:h text:style-name="P15" text:outline-level="2">Encontro 3 — Primeiro Programa Java + Git/GitHub</text:h>
      <text:list text:style-name="L8">
        <text:list-item>
          <text:p text:style-name="P24">Estrutura do projeto</text:p>
        </text:list-item>
        <text:list-item>
          <text:p text:style-name="P24">Classe principal</text:p>
        </text:list-item>
        <text:list-item>
          <text:p text:style-name="P24">Método main</text:p>
        </text:list-item>
        <text:list-item>
          <text:p text:style-name="P24">Comentários</text:p>
        </text:list-item>
        <text:list-item>
          <text:p text:style-name="P24"><text:soft-page-break/>System.out.println</text:p>
        </text:list-item>
        <text:list-item>
          <text:p text:style-name="P24">Hello World</text:p>
        </text:list-item>
        <text:list-item>
          <text:p text:style-name="P24">Organização inicial de código</text:p>
        </text:list-item>
        <text:list-item>
          <text:p text:style-name="P24">Convenções de nomenclatura</text:p>
        </text:list-item>
        <text:list-item>
          <text:p text:style-name="P24">Clean Code básico</text:p>
        </text:list-item>
        <text:list-item>
          <text:p text:style-name="P24">Git</text:p>
        </text:list-item>
        <text:list-item>
          <text:p text:style-name="P24">GitHub</text:p>
        </text:list-item>
        <text:list-item>
          <text:p text:style-name="P24">git init</text:p>
        </text:list-item>
        <text:list-item>
          <text:p text:style-name="P24">commit</text:p>
        </text:list-item>
        <text:list-item>
          <text:p text:style-name="P24">push</text:p>
        </text:list-item>
        <text:list-item>
          <text:p text:style-name="P25">versionamento profissional</text:p>
        </text:list-item>
      </text:list>
      <text:p text:style-name="P17"/>
      <text:h text:style-name="P26" text:outline-level="1">FASE 2 — FUNDAMENTOS DO JAVA</text:h>
      <text:h text:style-name="P15" text:outline-level="2">Encontro 4 — Variáveis, Tipos e Operadores</text:h>
      <text:list text:style-name="L9">
        <text:list-item>
          <text:p text:style-name="P27">Tipos primitivos</text:p>
        </text:list-item>
        <text:list-item>
          <text:p text:style-name="P27">String</text:p>
        </text:list-item>
        <text:list-item>
          <text:p text:style-name="P27">Variáveis</text:p>
        </text:list-item>
        <text:list-item>
          <text:p text:style-name="P27">Declaração</text:p>
        </text:list-item>
        <text:list-item>
          <text:p text:style-name="P27">Atribuição</text:p>
        </text:list-item>
        <text:list-item>
          <text:p text:style-name="P27">Valores default</text:p>
        </text:list-item>
        <text:list-item>
          <text:p text:style-name="P27">Wrapper classes</text:p>
        </text:list-item>
        <text:list-item>
          <text:p text:style-name="P27">Conversões</text:p>
        </text:list-item>
        <text:list-item>
          <text:p text:style-name="P27">var no Java moderno</text:p>
        </text:list-item>
        <text:list-item>
          <text:p text:style-name="P27">Operadores aritméticos</text:p>
        </text:list-item>
        <text:list-item>
          <text:p text:style-name="P27">Operadores relacionais</text:p>
        </text:list-item>
        <text:list-item>
          <text:p text:style-name="P27">Operadores lógicos</text:p>
        </text:list-item>
        <text:list-item>
          <text:p text:style-name="P27">Operadores de atribuição</text:p>
        </text:list-item>
        <text:list-item>
          <text:p text:style-name="P28">Precedência de operadores</text:p>
        </text:list-item>
      </text:list>
      <text:p text:style-name="P17"/>
      <text:h text:style-name="P15" text:outline-level="2">Encontro 5 — Entrada de Dados, Memória e Debug</text:h>
      <text:list text:style-name="L10">
        <text:list-item>
          <text:p text:style-name="P29">Scanner</text:p>
        </text:list-item>
        <text:list-item>
          <text:p text:style-name="P29">Entrada pelo teclado</text:p>
        </text:list-item>
        <text:list-item>
          <text:p text:style-name="P29">Conversões de tipos</text:p>
        </text:list-item>
        <text:list-item>
          <text:p text:style-name="P29">Stack vs Heap</text:p>
        </text:list-item>
        <text:list-item>
          <text:p text:style-name="P29">Referência vs valor</text:p>
        </text:list-item>
        <text:list-item>
          <text:p text:style-name="P29">Mutabilidade</text:p>
        </text:list-item>
        <text:list-item>
          <text:p text:style-name="P29">Imutabilidade</text:p>
        </text:list-item>
        <text:list-item>
          <text:p text:style-name="P29">Garbage Collector</text:p>
        </text:list-item>
        <text:list-item>
          <text:p text:style-name="P29">Exceptions</text:p>
        </text:list-item>
        <text:list-item>
          <text:p text:style-name="P29">Stack trace</text:p>
        </text:list-item>
        <text:list-item>
          <text:p text:style-name="P29">Debug</text:p>
        </text:list-item>
        <text:list-item>
          <text:p text:style-name="P29">Breakpoints</text:p>
        </text:list-item>
        <text:list-item>
          <text:p text:style-name="P30">Interpretação de erros</text:p>
        </text:list-item>
      </text:list>
      <text:p text:style-name="P17"/>
      <text:h text:style-name="P26" text:outline-level="1"><text:soft-page-break/>FASE 3 — CONTROLE DE FLUXO</text:h>
      <text:h text:style-name="P15" text:outline-level="2">Encontro 6 — Estruturas Condicionais e Switch Moderno</text:h>
      <text:list text:style-name="L11">
        <text:list-item>
          <text:p text:style-name="P31">if</text:p>
        </text:list-item>
        <text:list-item>
          <text:p text:style-name="P31">else</text:p>
        </text:list-item>
        <text:list-item>
          <text:p text:style-name="P31">else if</text:p>
        </text:list-item>
        <text:list-item>
          <text:p text:style-name="P31">Operadores condicionais</text:p>
        </text:list-item>
        <text:list-item>
          <text:p text:style-name="P31">switch tradicional</text:p>
        </text:list-item>
        <text:list-item>
          <text:p text:style-name="P31">switch expression moderno</text:p>
        </text:list-item>
        <text:list-item>
          <text:p text:style-name="P31">Enum</text:p>
        </text:list-item>
        <text:list-item>
          <text:p text:style-name="P31">Pattern Matching introdutório</text:p>
        </text:list-item>
        <text:list-item>
          <text:p text:style-name="P31">Validações</text:p>
        </text:list-item>
        <text:list-item>
          <text:p text:style-name="P32">Boas práticas</text:p>
        </text:list-item>
      </text:list>
      <text:p text:style-name="P17"/>
      <text:h text:style-name="P15" text:outline-level="2">Encontro 7 — Estruturas de Repetição</text:h>
      <text:list text:style-name="L12">
        <text:list-item>
          <text:p text:style-name="P33">while</text:p>
        </text:list-item>
        <text:list-item>
          <text:p text:style-name="P33">do while</text:p>
        </text:list-item>
        <text:list-item>
          <text:p text:style-name="P33">for</text:p>
        </text:list-item>
        <text:list-item>
          <text:p text:style-name="P33">for-each</text:p>
        </text:list-item>
        <text:list-item>
          <text:p text:style-name="P33">Loops infinitos</text:p>
        </text:list-item>
        <text:list-item>
          <text:p text:style-name="P33">Iterações</text:p>
        </text:list-item>
        <text:list-item>
          <text:p text:style-name="P33">Casos de uso</text:p>
        </text:list-item>
        <text:list-item>
          <text:p text:style-name="P34">Exercícios práticos</text:p>
        </text:list-item>
      </text:list>
      <text:p text:style-name="P17"/>
      <text:h text:style-name="P15" text:outline-level="2">Encontro 8 — Exercícios Intensivos de Lógica</text:h>
      <text:list text:style-name="L13">
        <text:list-item>
          <text:p text:style-name="P35">Exercícios guiados</text:p>
        </text:list-item>
        <text:list-item>
          <text:p text:style-name="P35">Problemas reais</text:p>
        </text:list-item>
        <text:list-item>
          <text:p text:style-name="P35">Combinação de estruturas</text:p>
        </text:list-item>
        <text:list-item>
          <text:p text:style-name="P35">Mini desafios</text:p>
        </text:list-item>
        <text:list-item>
          <text:p text:style-name="P35">Algoritmos básicos</text:p>
        </text:list-item>
        <text:list-item>
          <text:p text:style-name="P36">Pensamento lógico</text:p>
        </text:list-item>
      </text:list>
      <text:p text:style-name="P17"/>
      <text:h text:style-name="P26" text:outline-level="1">FASE 4 — ESTRUTURAS DE DADOS E ALGORITMOS</text:h>
      <text:h text:style-name="P15" text:outline-level="2">Encontro 9 — Arrays e Iterações</text:h>
      <text:list text:style-name="L14">
        <text:list-item>
          <text:p text:style-name="P37">Arrays</text:p>
        </text:list-item>
        <text:list-item>
          <text:p text:style-name="P37">Inicialização</text:p>
        </text:list-item>
        <text:list-item>
          <text:p text:style-name="P37">Iteração</text:p>
        </text:list-item>
        <text:list-item>
          <text:p text:style-name="P37">Problemas comuns</text:p>
        </text:list-item>
        <text:list-item>
          <text:p text:style-name="P38">Exercícios práticos</text:p>
        </text:list-item>
      </text:list>
      <text:p text:style-name="P17"/>
      <text:h text:style-name="P15" text:outline-level="2"><text:soft-page-break/>Encontro 10 — Matrizes e Estruturas Bidimensionais</text:h>
      <text:list text:style-name="L15">
        <text:list-item>
          <text:p text:style-name="P39">Matrizes</text:p>
        </text:list-item>
        <text:list-item>
          <text:p text:style-name="P39">Arrays bidimensionais</text:p>
        </text:list-item>
        <text:list-item>
          <text:p text:style-name="P39">Percorrendo matrizes</text:p>
        </text:list-item>
        <text:list-item>
          <text:p text:style-name="P40">Exercícios práticos</text:p>
        </text:list-item>
      </text:list>
      <text:p text:style-name="P13"/>
      <text:h text:style-name="P10" text:outline-level="2">Encontro 11 — Algoritmos e Complexidade</text:h>
      <text:list text:style-name="L16">
        <text:list-item>
          <text:p text:style-name="P41">Algoritmos</text:p>
        </text:list-item>
        <text:list-item>
          <text:p text:style-name="P41">Pensamento lógico</text:p>
        </text:list-item>
        <text:list-item>
          <text:p text:style-name="P41">Busca linear</text:p>
        </text:list-item>
        <text:list-item>
          <text:p text:style-name="P41">Busca binária</text:p>
        </text:list-item>
        <text:list-item>
          <text:p text:style-name="P41">Complexidade O(1)</text:p>
        </text:list-item>
        <text:list-item>
          <text:p text:style-name="P41">Complexidade O(n)</text:p>
        </text:list-item>
        <text:list-item>
          <text:p text:style-name="P42">Resolução de problemas</text:p>
        </text:list-item>
      </text:list>
      <text:p text:style-name="P13"/>
      <text:h text:style-name="P10" text:outline-level="2">Encontro 12 — Exercícios Intensivos e Desafios</text:h>
      <text:list text:style-name="L17">
        <text:list-item>
          <text:p text:style-name="P43">Fixação forte</text:p>
        </text:list-item>
        <text:list-item>
          <text:p text:style-name="P43">Desafios práticos</text:p>
        </text:list-item>
        <text:list-item>
          <text:p text:style-name="P43">Resolução comentada</text:p>
        </text:list-item>
        <text:list-item>
          <text:p text:style-name="P43">Problemas reais</text:p>
        </text:list-item>
        <text:list-item>
          <text:p text:style-name="P44">Preparação para POO</text:p>
        </text:list-item>
      </text:list>
      <text:p text:style-name="P13"/>
      <text:h text:style-name="P14" text:outline-level="1">FASE 5 — ORIENTAÇÃO A OBJETOS</text:h>
      <text:h text:style-name="P10" text:outline-level="2">Encontro 13 — Introdução à Programação Orientada a Objetos</text:h>
      <text:list text:style-name="L18">
        <text:list-item>
          <text:p text:style-name="P45">Paradigma orientado a objetos</text:p>
        </text:list-item>
        <text:list-item>
          <text:p text:style-name="P45">Objetos</text:p>
        </text:list-item>
        <text:list-item>
          <text:p text:style-name="P45">Classes</text:p>
        </text:list-item>
        <text:list-item>
          <text:p text:style-name="P45">Mundo real aplicado</text:p>
        </text:list-item>
        <text:list-item>
          <text:p text:style-name="P45">Responsabilidade de objetos</text:p>
        </text:list-item>
        <text:list-item>
          <text:p text:style-name="P45">Packages</text:p>
        </text:list-item>
        <text:list-item>
          <text:p text:style-name="P46">Organização de código</text:p>
        </text:list-item>
      </text:list>
      <text:p text:style-name="P13"/>
      <text:h text:style-name="P10" text:outline-level="2">Encontro 14 — Classe, Objeto, Métodos e Encapsulamento</text:h>
      <text:list text:style-name="L19">
        <text:list-item>
          <text:p text:style-name="P47">Criando classes</text:p>
        </text:list-item>
        <text:list-item>
          <text:p text:style-name="P47">Criando objetos</text:p>
        </text:list-item>
        <text:list-item>
          <text:p text:style-name="P47">Instanciação</text:p>
        </text:list-item>
        <text:list-item>
          <text:p text:style-name="P47">Atributos</text:p>
        </text:list-item>
        <text:list-item>
          <text:p text:style-name="P47">Métodos</text:p>
        </text:list-item>
        <text:list-item>
          <text:p text:style-name="P47">Parâmetros</text:p>
        </text:list-item>
        <text:list-item>
          <text:p text:style-name="P47">Retorno</text:p>
        </text:list-item>
        <text:list-item>
          <text:p text:style-name="P47">this</text:p>
        </text:list-item>
        <text:list-item>
          <text:p text:style-name="P47"><text:soft-page-break/>Métodos estáticos</text:p>
        </text:list-item>
        <text:list-item>
          <text:p text:style-name="P47">private</text:p>
        </text:list-item>
        <text:list-item>
          <text:p text:style-name="P47">public</text:p>
        </text:list-item>
        <text:list-item>
          <text:p text:style-name="P47">protected</text:p>
        </text:list-item>
        <text:list-item>
          <text:p text:style-name="P47">getters</text:p>
        </text:list-item>
        <text:list-item>
          <text:p text:style-name="P47">setters</text:p>
        </text:list-item>
        <text:list-item>
          <text:p text:style-name="P48">Imutabilidade</text:p>
        </text:list-item>
      </text:list>
      <text:p text:style-name="P13"/>
      <text:h text:style-name="P10" text:outline-level="2">Encontro 15 — Herança, Polimorfismo e Interfaces</text:h>
      <text:list text:style-name="L20">
        <text:list-item>
          <text:p text:style-name="P49">Herança</text:p>
        </text:list-item>
        <text:list-item>
          <text:p text:style-name="P49">Superclasse</text:p>
        </text:list-item>
        <text:list-item>
          <text:p text:style-name="P49">Subclasse</text:p>
        </text:list-item>
        <text:list-item>
          <text:p text:style-name="P49">Sobrescrita</text:p>
        </text:list-item>
        <text:list-item>
          <text:p text:style-name="P49">Sobrecarga</text:p>
        </text:list-item>
        <text:list-item>
          <text:p text:style-name="P49">Polimorfismo</text:p>
        </text:list-item>
        <text:list-item>
          <text:p text:style-name="P49">Classe abstrata</text:p>
        </text:list-item>
        <text:list-item>
          <text:p text:style-name="P49">Interface</text:p>
        </text:list-item>
        <text:list-item>
          <text:p text:style-name="P49">Contratos</text:p>
        </text:list-item>
        <text:list-item>
          <text:p text:style-name="P49">Classes anônimas</text:p>
        </text:list-item>
        <text:list-item>
          <text:p text:style-name="P49">Record</text:p>
        </text:list-item>
        <text:list-item>
          <text:p text:style-name="P50">Sealed Classes</text:p>
        </text:list-item>
      </text:list>
      <text:p text:style-name="P13"/>
      <text:h text:style-name="P14" text:outline-level="1">FASE 6 — JAVA MODERNO E RECURSOS PROFISSIONAIS</text:h>
      <text:h text:style-name="P10" text:outline-level="2">Encontro 16 — Collections API e Generics</text:h>
      <text:list text:style-name="L21">
        <text:list-item>
          <text:p text:style-name="P51">List</text:p>
        </text:list-item>
        <text:list-item>
          <text:p text:style-name="P51">Set</text:p>
        </text:list-item>
        <text:list-item>
          <text:p text:style-name="P51">Map</text:p>
        </text:list-item>
        <text:list-item>
          <text:p text:style-name="P51">Queue</text:p>
        </text:list-item>
        <text:list-item>
          <text:p text:style-name="P51">Comparable</text:p>
        </text:list-item>
        <text:list-item>
          <text:p text:style-name="P51">Comparator</text:p>
        </text:list-item>
        <text:list-item>
          <text:p text:style-name="P51">Collections utilitárias</text:p>
        </text:list-item>
        <text:list-item>
          <text:p text:style-name="P51">Generics</text:p>
        </text:list-item>
        <text:list-item>
          <text:p text:style-name="P51">Tipagem segura</text:p>
        </text:list-item>
        <text:list-item>
          <text:p text:style-name="P52">Wildcards</text:p>
        </text:list-item>
      </text:list>
      <text:p text:style-name="P13"/>
      <text:h text:style-name="P10" text:outline-level="2">Encontro 17 — Exceptions Profissionais</text:h>
      <text:list text:style-name="L22">
        <text:list-item>
          <text:p text:style-name="P53">try/catch</text:p>
        </text:list-item>
        <text:list-item>
          <text:p text:style-name="P53">throws</text:p>
        </text:list-item>
        <text:list-item>
          <text:p text:style-name="P53">finally</text:p>
        </text:list-item>
        <text:list-item>
          <text:p text:style-name="P54">Exceptions customizadas</text:p>
        </text:list-item>
      </text:list>
      <text:p text:style-name="P13"/>
      <text:h text:style-name="P10" text:outline-level="2"><text:soft-page-break/>Encontro 18 — Programação Funcional no Java</text:h>
      <text:list text:style-name="L23">
        <text:list-item>
          <text:p text:style-name="P55">Lambda</text:p>
        </text:list-item>
        <text:list-item>
          <text:p text:style-name="P55">Functional Interface</text:p>
        </text:list-item>
        <text:list-item>
          <text:p text:style-name="P55">Predicate</text:p>
        </text:list-item>
        <text:list-item>
          <text:p text:style-name="P55">Function</text:p>
        </text:list-item>
        <text:list-item>
          <text:p text:style-name="P55">Consumer</text:p>
        </text:list-item>
        <text:list-item>
          <text:p text:style-name="P55">Method Reference</text:p>
        </text:list-item>
        <text:list-item>
          <text:p text:style-name="P56">Introdução funcional</text:p>
        </text:list-item>
      </text:list>
      <text:p text:style-name="P13"/>
      <text:h text:style-name="P10" text:outline-level="2">Encontro 19 — Stream API e Java Moderno</text:h>
      <text:list text:style-name="L24">
        <text:list-item>
          <text:p text:style-name="P57">Stream</text:p>
        </text:list-item>
        <text:list-item>
          <text:p text:style-name="P57">filter</text:p>
        </text:list-item>
        <text:list-item>
          <text:p text:style-name="P57">map</text:p>
        </text:list-item>
        <text:list-item>
          <text:p text:style-name="P57">reduce</text:p>
        </text:list-item>
        <text:list-item>
          <text:p text:style-name="P57">sorted</text:p>
        </text:list-item>
        <text:list-item>
          <text:p text:style-name="P57">collect</text:p>
        </text:list-item>
        <text:list-item>
          <text:p text:style-name="P57">Optional</text:p>
        </text:list-item>
        <text:list-item>
          <text:p text:style-name="P57">Text Blocks</text:p>
        </text:list-item>
        <text:list-item>
          <text:p text:style-name="P57">Pattern Matching</text:p>
        </text:list-item>
        <text:list-item>
          <text:p text:style-name="P57">HttpClient</text:p>
        </text:list-item>
        <text:list-item>
          <text:p text:style-name="P57">Collections imutáveis</text:p>
        </text:list-item>
        <text:list-item>
          <text:p text:style-name="P58">Virtual Threads introduc\ca~ointroduçãointroduc\c​a~o</text:p>
        </text:list-item>
      </text:list>
      <text:p text:style-name="P13"/>
      <text:h text:style-name="P14" text:outline-level="1">FASE 7 — FERRAMENTAS PROFISSIONAIS</text:h>
      <text:h text:style-name="P10" text:outline-level="2">Encontro 20 — Maven e Build Profissional</text:h>
      <text:list text:style-name="L25">
        <text:list-item>
          <text:p text:style-name="P59">Maven</text:p>
        </text:list-item>
        <text:list-item>
          <text:p text:style-name="P59">pom.xml</text:p>
        </text:list-item>
        <text:list-item>
          <text:p text:style-name="P59">Dependências</text:p>
        </text:list-item>
        <text:list-item>
          <text:p text:style-name="P59">Build</text:p>
        </text:list-item>
        <text:list-item>
          <text:p text:style-name="P59">Lifecycle</text:p>
        </text:list-item>
        <text:list-item>
          <text:p text:style-name="P59">Plugins</text:p>
        </text:list-item>
        <text:list-item>
          <text:p text:style-name="P60">Empacotamento</text:p>
        </text:list-item>
      </text:list>
      <text:p text:style-name="P13"/>
      <text:h text:style-name="P10" text:outline-level="2">Encontro 21 — Arquitetura de Projetos Java</text:h>
      <text:list text:style-name="L26">
        <text:list-item>
          <text:p text:style-name="P61">Organização profissional</text:p>
        </text:list-item>
        <text:list-item>
          <text:p text:style-name="P61">Camadas</text:p>
        </text:list-item>
        <text:list-item>
          <text:p text:style-name="P61">model</text:p>
        </text:list-item>
        <text:list-item>
          <text:p text:style-name="P61">service</text:p>
        </text:list-item>
        <text:list-item>
          <text:p text:style-name="P61">repository</text:p>
        </text:list-item>
        <text:list-item>
          <text:p text:style-name="P61">controller</text:p>
        </text:list-item>
        <text:list-item>
          <text:p text:style-name="P61">DTO</text:p>
        </text:list-item>
        <text:list-item>
          <text:p text:style-name="P62">Separação de responsabilidades</text:p>
        </text:list-item>
      </text:list>
      <text:p text:style-name="P13"/>
      <text:h text:style-name="P10" text:outline-level="2"><text:soft-page-break/>Encontro 22 — Testes Unitários com JUnit</text:h>
      <text:list text:style-name="L27">
        <text:list-item>
          <text:p text:style-name="P63">JUnit 5</text:p>
        </text:list-item>
        <text:list-item>
          <text:p text:style-name="P63">Assertions</text:p>
        </text:list-item>
        <text:list-item>
          <text:p text:style-name="P63">Estrutura AAA</text:p>
        </text:list-item>
        <text:list-item>
          <text:p text:style-name="P63">Testes unitários</text:p>
        </text:list-item>
        <text:list-item>
          <text:p text:style-name="P63">Introdução ao TDD</text:p>
        </text:list-item>
        <text:list-item>
          <text:p text:style-name="P64">Testes práticos</text:p>
        </text:list-item>
      </text:list>
      <text:p text:style-name="P13"/>
      <text:h text:style-name="P14" text:outline-level="1">FASE 8 — BANCO DE DADOS E APIs</text:h>
      <text:h text:style-name="P10" text:outline-level="2">Encontro 23 — Banco de Dados SQL e PostgreSQL</text:h>
      <text:list text:style-name="L28">
        <text:list-item>
          <text:p text:style-name="P65">PostgreSQL</text:p>
        </text:list-item>
        <text:list-item>
          <text:p text:style-name="P65">Modelagem básica</text:p>
        </text:list-item>
        <text:list-item>
          <text:p text:style-name="P65">SELECT</text:p>
        </text:list-item>
        <text:list-item>
          <text:p text:style-name="P65">INSERT</text:p>
        </text:list-item>
        <text:list-item>
          <text:p text:style-name="P65">UPDATE</text:p>
        </text:list-item>
        <text:list-item>
          <text:p text:style-name="P65">DELETE</text:p>
        </text:list-item>
        <text:list-item>
          <text:p text:style-name="P65">JOIN</text:p>
        </text:list-item>
        <text:list-item>
          <text:p text:style-name="P66">Relacionamentos</text:p>
        </text:list-item>
      </text:list>
      <text:p text:style-name="P13"/>
      <text:h text:style-name="P10" text:outline-level="2">Encontro 24 — JDBC e Integração Java com Banco</text:h>
      <text:list text:style-name="L29">
        <text:list-item>
          <text:p text:style-name="P67">Connection</text:p>
        </text:list-item>
        <text:list-item>
          <text:p text:style-name="P67">PreparedStatement</text:p>
        </text:list-item>
        <text:list-item>
          <text:p text:style-name="P67">ResultSet</text:p>
        </text:list-item>
        <text:list-item>
          <text:p text:style-name="P67">CRUD manual</text:p>
        </text:list-item>
        <text:list-item>
          <text:p text:style-name="P67">Integração Java + banco</text:p>
        </text:list-item>
        <text:list-item>
          <text:p text:style-name="P68">Boas práticas</text:p>
        </text:list-item>
      </text:list>
      <text:p text:style-name="P13"/>
      <text:h text:style-name="P10" text:outline-level="2">Encontro 25 — HTTP, JSON e APIs REST</text:h>
      <text:list text:style-name="L30">
        <text:list-item>
          <text:p text:style-name="P69">HTTP</text:p>
        </text:list-item>
        <text:list-item>
          <text:p text:style-name="P69">Request</text:p>
        </text:list-item>
        <text:list-item>
          <text:p text:style-name="P69">Response</text:p>
        </text:list-item>
        <text:list-item>
          <text:p text:style-name="P69">Métodos HTTP</text:p>
        </text:list-item>
        <text:list-item>
          <text:p text:style-name="P69">Status HTTP</text:p>
        </text:list-item>
        <text:list-item>
          <text:p text:style-name="P69">JSON</text:p>
        </text:list-item>
        <text:list-item>
          <text:p text:style-name="P69">REST</text:p>
        </text:list-item>
        <text:list-item>
          <text:p text:style-name="P69">Postman</text:p>
        </text:list-item>
        <text:list-item>
          <text:p text:style-name="P70">Consumo de APIs</text:p>
        </text:list-item>
      </text:list>
      <text:p text:style-name="P13"/>
      <text:h text:style-name="P14" text:outline-level="1"><text:soft-page-break/>FASE 9 — SPRING BOOT E MERCADO</text:h>
      <text:h text:style-name="P10" text:outline-level="2">Encontro 26 — Introdução ao Spring Boot</text:h>
      <text:list text:style-name="L31">
        <text:list-item>
          <text:p text:style-name="P71">O que é Spring Boot</text:p>
        </text:list-item>
        <text:list-item>
          <text:p text:style-name="P71">Estrutura do projeto</text:p>
        </text:list-item>
        <text:list-item>
          <text:p text:style-name="P71">Dependências</text:p>
        </text:list-item>
        <text:list-item>
          <text:p text:style-name="P71">Controllers</text:p>
        </text:list-item>
        <text:list-item>
          <text:p text:style-name="P71">API REST inicial</text:p>
        </text:list-item>
        <text:list-item>
          <text:p text:style-name="P72">Integração com banco</text:p>
        </text:list-item>
      </text:list>
      <text:p text:style-name="P13"/>
      <text:h text:style-name="P10" text:outline-level="2">Encontro 27 — Projeto Profissional Guiado</text:h>
      <text:list text:style-name="L32">
        <text:list-item>
          <text:p text:style-name="P73">Desenvolvimento de projeto real</text:p>
        </text:list-item>
        <text:list-item>
          <text:p text:style-name="P73">Arquitetura completa</text:p>
        </text:list-item>
        <text:list-item>
          <text:p text:style-name="P73">CRUD profissional</text:p>
        </text:list-item>
        <text:list-item>
          <text:p text:style-name="P73">API REST</text:p>
        </text:list-item>
        <text:list-item>
          <text:p text:style-name="P73">Banco de dados</text:p>
        </text:list-item>
        <text:list-item>
          <text:p text:style-name="P73">Validações</text:p>
        </text:list-item>
        <text:list-item>
          <text:p text:style-name="P74">Boas práticas</text:p>
        </text:list-item>
      </text:list>
      <text:p text:style-name="P13"/>
      <text:h text:style-name="P10" text:outline-level="2">Encontro 28 — Projeto Final e Deploy</text:h>
      <text:list text:style-name="L33">
        <text:list-item>
          <text:p text:style-name="P75">Finalização do projeto</text:p>
        </text:list-item>
        <text:list-item>
          <text:p text:style-name="P75">Refatoração</text:p>
        </text:list-item>
        <text:list-item>
          <text:p text:style-name="P75">Organização profissional</text:p>
        </text:list-item>
        <text:list-item>
          <text:p text:style-name="P75">Publicação GitHub</text:p>
        </text:list-item>
        <text:list-item>
          <text:p text:style-name="P75">Build final</text:p>
        </text:list-item>
        <text:list-item>
          <text:p text:style-name="P75">Deploy introdutório</text:p>
        </text:list-item>
        <text:list-item>
          <text:p text:style-name="P76">Preparação de portfólio</text:p>
        </text:list-item>
      </text:list>
      <text:p text:style-name="P13"/>
      <text:h text:style-name="P10" text:outline-level="2">Encontro 29 — Preparação para Mercado Java</text:h>
      <text:list text:style-name="L34">
        <text:list-item>
          <text:p text:style-name="P77">Como montar portfólio</text:p>
        </text:list-item>
        <text:list-item>
          <text:p text:style-name="P77">Como montar GitHub</text:p>
        </text:list-item>
        <text:list-item>
          <text:p text:style-name="P77">Como estudar corretamente</text:p>
        </text:list-item>
        <text:list-item>
          <text:p text:style-name="P77">Vagas Java</text:p>
        </text:list-item>
        <text:list-item>
          <text:p text:style-name="P77">Carreira backend</text:p>
        </text:list-item>
        <text:list-item>
          <text:p text:style-name="P77">Entrevistas técnicas</text:p>
        </text:list-item>
        <text:list-item>
          <text:p text:style-name="P78">Roadmap Java profissional</text:p>
        </text:list-item>
      </text:list>
      <text:p text:style-name="P13"/>
      <text:h text:style-name="P14" text:outline-level="1">PROJETO CONTÍNUO DA FORMAÇÃO</text:h>
      <text:p text:style-name="P2">Durante toda a formação o aluno desenvolverá um projeto real evolutivo.</text:p>
      <text:p text:style-name="P2">Sugestão:</text:p>
      <text:list text:style-name="L35">
        <text:list-item>
          <text:p text:style-name="P79">Sistema de Estoque</text:p>
        </text:list-item>
        <text:list-item>
          <text:p text:style-name="P79"><text:soft-page-break/>Mini ERP</text:p>
        </text:list-item>
        <text:list-item>
          <text:p text:style-name="P79">Sistema Bancário</text:p>
        </text:list-item>
        <text:list-item>
          <text:p text:style-name="P79">Biblioteca</text:p>
        </text:list-item>
        <text:list-item>
          <text:p text:style-name="P80">Agenda Profissional</text:p>
        </text:list-item>
      </text:list>
      <text:p text:style-name="P2">O projeto deve evoluir conforme os conteúdos avançam.</text:p>
      <text:p text:style-name="P13"/>
      <text:h text:style-name="P14" text:outline-level="1">DIFERENCIAIS DA FORMAÇÃO</text:h>
      <text:list text:style-name="L36">
        <text:list-item>
          <text:p text:style-name="P81">Java moderno 21/25</text:p>
        </text:list-item>
        <text:list-item>
          <text:p text:style-name="P81">Formação baseada no mercado atual</text:p>
        </text:list-item>
        <text:list-item>
          <text:p text:style-name="P81">Fundamentos sólidos</text:p>
        </text:list-item>
        <text:list-item>
          <text:p text:style-name="P81">POO profissional</text:p>
        </text:list-item>
        <text:list-item>
          <text:p text:style-name="P81">APIs REST</text:p>
        </text:list-item>
        <text:list-item>
          <text:p text:style-name="P81">Git/GitHub</text:p>
        </text:list-item>
        <text:list-item>
          <text:p text:style-name="P81">Maven</text:p>
        </text:list-item>
        <text:list-item>
          <text:p text:style-name="P81">Testes unitários</text:p>
        </text:list-item>
        <text:list-item>
          <text:p text:style-name="P81">Spring Boot</text:p>
        </text:list-item>
        <text:list-item>
          <text:p text:style-name="P81">Arquitetura profissional</text:p>
        </text:list-item>
        <text:list-item>
          <text:p text:style-name="P81">Projeto real completo</text:p>
        </text:list-item>
        <text:list-item>
          <text:p text:style-name="P81">Preparação para entrevistas</text:p>
        </text:list-item>
        <text:list-item>
          <text:p text:style-name="P82">Formação voltada para empregabilidade</text:p>
        </text:list-item>
      </text:list>
      <text:p text:style-name="P13"/>
      <text:h text:style-name="P14" text:outline-level="1">PERFIL FINAL DO ALUNO</text:h>
      <text:p text:style-name="P2">Ao finalizar a formação o aluno será capaz de:</text:p>
      <text:list text:style-name="L37">
        <text:list-item>
          <text:p text:style-name="P83">Desenvolver aplicações Java modernas</text:p>
        </text:list-item>
        <text:list-item>
          <text:p text:style-name="P83">Criar APIs REST</text:p>
        </text:list-item>
        <text:list-item>
          <text:p text:style-name="P83">Trabalhar com banco de dados</text:p>
        </text:list-item>
        <text:list-item>
          <text:p text:style-name="P83">Utilizar Git/GitHub</text:p>
        </text:list-item>
        <text:list-item>
          <text:p text:style-name="P83">Utilizar Maven</text:p>
        </text:list-item>
        <text:list-item>
          <text:p text:style-name="P83">Aplicar boas práticas</text:p>
        </text:list-item>
        <text:list-item>
          <text:p text:style-name="P83">Trabalhar com Spring Boot</text:p>
        </text:list-item>
        <text:list-item>
          <text:p text:style-name="P83">Entender arquitetura backend</text:p>
        </text:list-item>
        <text:list-item>
          <text:p text:style-name="P83">Criar projetos profissionais</text:p>
        </text:list-item>
        <text:list-item>
          <text:p text:style-name="P84">Estar preparado para vagas Java Jún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16:57:32.487075300</meta:creation-date>
    <dc:date>2026-07-09T18:42:38.385108200</dc:date>
    <meta:editing-duration>PT9H52M47S</meta:editing-duration>
    <meta:editing-cycles>19</meta:editing-cycles>
    <meta:generator>LibreOffice/26.2.4.2$Windows_X86_64 LibreOffice_project/0229ac93fcf0d7cbc6376066c6f35021cef002dc</meta:generator>
    <meta:document-statistic meta:table-count="0" meta:image-count="0" meta:object-count="0" meta:page-count="10" meta:paragraph-count="364" meta:word-count="1316" meta:character-count="7437" meta:non-whitespace-character-count="6747"/>
  </office:meta>
</office:document-meta>
</file>